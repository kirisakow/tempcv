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MS PMincho" svg:font-family="'MS PMincho'" style:font-family-generic="system" style:font-pitch="variable"/>
    <style:font-face style:name="Noto Sans Mono CJK JP" svg:font-family="'Noto Sans Mono CJK JP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92cm" style:rel-column-width="34385*"/>
    </style:style>
    <style:style style:name="Table1.B" style:family="table-column">
      <style:table-column-properties style:column-width="8.08cm" style:rel-column-width="31150*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" fo:padding="0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25cm" style:rel-column-width="31801*"/>
    </style:style>
    <style:style style:name="Table2.B" style:family="table-column">
      <style:table-column-properties style:column-width="0.501cm" style:rel-column-width="1931*"/>
    </style:style>
    <style:style style:name="Table2.C" style:family="table-column">
      <style:table-column-properties style:column-width="8.25cm" style:rel-column-width="31803*"/>
    </style:style>
    <style:style style:name="Table2.A1" style:family="table-cell">
      <style:table-cell-properties fo:padding="0cm" fo:border="none"/>
    </style:style>
    <style:style style:name="P1" style:family="paragraph" style:parent-style-name="Text_20_body">
      <style:paragraph-properties fo:text-align="left" style:justify-single-word="false"/>
      <style:text-properties fo:font-size="4pt" style:font-size-asian="4pt" style:font-size-complex="4pt"/>
    </style:style>
    <style:style style:name="P2" style:family="paragraph" style:parent-style-name="Standard">
      <style:text-properties officeooo:paragraph-rsid="00149185"/>
    </style:style>
    <style:style style:name="P3" style:family="paragraph" style:parent-style-name="Standard">
      <style:text-properties officeooo:rsid="00149185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ext_20_body_20_A_20_l_27_attention_20_de" style:list-style-name="L1">
      <style:text-properties officeooo:paragraph-rsid="0046493d"/>
    </style:style>
    <style:style style:name="P6" style:family="paragraph" style:parent-style-name="Text_20_body_20_A_20_l_27_attention_20_de" style:list-style-name="L1">
      <style:text-properties fo:color="#000000" loext:opacity="100%" style:font-name="Times New Roman1" fo:font-size="10.5pt" fo:language="fr" fo:country="FR" fo:text-shadow="1pt 1pt" fo:font-weight="bold" officeooo:rsid="0046493d" officeooo:paragraph-rsid="0046493d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7" style:family="paragraph" style:parent-style-name="Text_20_body">
      <style:paragraph-properties fo:text-align="right" style:justify-single-word="false"/>
    </style:style>
    <style:style style:name="P8" style:family="paragraph" style:parent-style-name="Text_20_body">
      <style:paragraph-properties fo:text-align="right" style:justify-single-word="false"/>
      <style:text-properties fo:font-style="italic" style:font-style-asian="italic" style:font-style-complex="italic"/>
    </style:style>
    <style:style style:name="P9" style:family="paragraph" style:parent-style-name="Text_20_body_20_Subject_20__28_Objet_29_">
      <style:text-properties officeooo:paragraph-rsid="0033b904"/>
    </style:style>
    <style:style style:name="P10" style:family="paragraph" style:parent-style-name="Text_20_body_20_EN">
      <style:text-properties officeooo:paragraph-rsid="002f1969"/>
    </style:style>
    <style:style style:name="P11" style:family="paragraph" style:parent-style-name="Text_20_body">
      <style:text-properties officeooo:paragraph-rsid="002f1969"/>
    </style:style>
    <style:style style:name="P12" style:family="paragraph" style:parent-style-name="Text_20_body_20_EN">
      <style:text-properties officeooo:paragraph-rsid="004a14b5"/>
    </style:style>
    <style:style style:name="P13" style:family="paragraph" style:parent-style-name="Text_20_body">
      <style:text-properties fo:font-weight="normal" officeooo:paragraph-rsid="00476aaa" style:font-weight-asian="normal" style:font-weight-complex="normal"/>
    </style:style>
    <style:style style:name="P14" style:family="paragraph" style:parent-style-name="Text_20_body_20_EN">
      <style:text-properties officeooo:paragraph-rsid="0031cba2"/>
    </style:style>
    <style:style style:name="P15" style:family="paragraph" style:parent-style-name="Text_20_body">
      <style:text-properties officeooo:paragraph-rsid="0046493d"/>
    </style:style>
    <style:style style:name="P16" style:family="paragraph" style:parent-style-name="Text_20_body_20_EN">
      <style:text-properties officeooo:paragraph-rsid="003eb5b8"/>
    </style:style>
    <style:style style:name="P17" style:family="paragraph" style:parent-style-name="Standard">
      <style:text-properties fo:font-size="9pt"/>
    </style:style>
    <style:style style:name="T1" style:family="text">
      <style:text-properties fo:font-size="9pt"/>
    </style:style>
    <style:style style:name="T2" style:family="text">
      <style:text-properties officeooo:rsid="00149185"/>
    </style:style>
    <style:style style:name="T3" style:family="text">
      <style:text-properties officeooo:rsid="0033b904"/>
    </style:style>
    <style:style style:name="T4" style:family="text">
      <style:text-properties officeooo:rsid="00171014"/>
    </style:style>
    <style:style style:name="T5" style:family="text">
      <style:text-properties fo:color="#000000" loext:opacity="100%" style:font-name="Times New Roman1" fo:font-size="10.5pt" fo:language="fr" fo:country="FR" fo:text-shadow="1pt 1pt" fo:font-weight="bold" officeooo:rsid="001f1d49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6" style:family="text">
      <style:text-properties fo:color="#000000" loext:opacity="100%" style:font-name="Times New Roman1" fo:font-size="10.5pt" fo:language="fr" fo:country="FR" fo:text-shadow="1pt 1pt" fo:font-weight="bold" officeooo:rsid="0046493d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7" style:family="text">
      <style:text-properties officeooo:rsid="004b30f5"/>
    </style:style>
    <style:style style:name="T8" style:family="text">
      <style:text-properties fo:font-style="italic" officeooo:rsid="00149185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underline-style="none" fo:font-weight="bold" officeooo:rsid="001e1ab8" style:font-weight-asian="bold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33b904"/>
    </style:style>
    <style:style style:name="T14" style:family="text">
      <style:text-properties style:text-underline-style="none" officeooo:rsid="00364dd1"/>
    </style:style>
    <style:style style:name="T15" style:family="text">
      <style:text-properties style:text-underline-style="none" fo:font-weight="bold" officeooo:rsid="00364dd1" style:font-weight-asian="bold" style:font-weight-complex="bold"/>
    </style:style>
    <style:style style:name="T16" style:family="text">
      <style:text-properties style:text-underline-style="none" fo:font-weight="bold" officeooo:rsid="003eb5b8" style:font-weight-asian="bold" style:font-weight-complex="bold"/>
    </style:style>
    <style:style style:name="T17" style:family="text">
      <style:text-properties style:text-underline-style="none" officeooo:rsid="003eb5b8"/>
    </style:style>
    <style:style style:name="T18" style:family="text">
      <style:text-properties officeooo:rsid="004a14b5"/>
    </style:style>
    <style:style style:name="T19" style:family="text">
      <style:text-properties officeooo:rsid="004b487d"/>
    </style:style>
    <style:style style:name="T20" style:family="text">
      <style:text-properties officeooo:rsid="0046493d"/>
    </style:style>
    <style:style style:name="T21" style:family="text">
      <style:text-properties officeooo:rsid="00476aa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date-style style:name="N44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Kiril I<text:span text:style-name="T1">SAKOV</text:span></text:p>
            <text:p text:style-name="P2"><text:span text:style-name="T2">18 rue d’Aguesseau </text:span><text:span text:style-name="T3">– </text:span><text:span text:style-name="T4">BP 18-36</text:span></text:p>
            <text:p text:style-name="P3">59800 Lille</text:p>
            <text:p text:style-name="Standard"><text:span text:style-name="T2">0</text:span>6 74 89 91 69</text:p>
            <text:p text:style-name="Standard">kirix.isakov@gmail.com</text:p>
          </table:table-cell>
          <table:table-cell table:style-name="Table1.B1" office:value-type="string">
            <text:p text:style-name="P4">À l’attention de</text:p>
            <text:list text:style-name="L1">
              <text:list-item>
                <text:p text:style-name="P5"><text:span text:style-name="T5">DRH, </text:span><text:span text:style-name="T6">CDC EP</text:span></text:p>
              </text:list-item>
              <text:list-item>
                <text:p text:style-name="P6"><text:span text:style-name="T7">Responsable d’</text:span>Équipe DPHD80 Data Etudes et Pilotage, Direction des prêts, BdT, CDC EP</text:p>
              </text:list-item>
            </text:list>
          </table:table-cell>
        </table:table-row>
      </table:table>
      <text:p text:style-name="Text_20_body"/>
      <text:p text:style-name="P7"><text:span text:style-name="T8">Lille</text:span><text:span text:style-name="T9">, le </text:span><text:span text:style-name="T9"><text:date style:data-style-name="N44" text:date-value="2026-05-18T00:21:47.222837512">lundi 18 mai 2026</text:date></text:span></text:p>
      <text:p text:style-name="P8"/>
      <text:p text:style-name="P9"><text:span text:style-name="T10">Subject / </text:span><text:span text:style-name="T11">Objet :</text:span><text:span text:style-name="T12"> </text:span><text:span text:style-name="T13">Candidat </text:span><text:span text:style-name="T14">au poste de </text:span><text:span text:style-name="T15">Data </text:span><text:span text:style-name="T16">scientist</text:span><text:span text:style-name="T17"> </text:span><text:span text:style-name="T14">(Réf. : </text:span><text:span text:style-name="Example"><text:span text:style-name="T17">ao04a62j1w</text:span></text:span><text:span text:style-name="T14">)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Dear Madam or Sir,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">Madame, Monsieur,</text:p>
          </table:table-cell>
        </table:table-row>
        <table:table-row>
          <table:table-cell table:style-name="Table2.A1" office:value-type="string">
            <text:p text:style-name="Text_20_body_20_EN">I am currently completing an apprenticeship as a data scientist in the <text:span text:style-name="T18">Direction de la formation professionnelle </text:span>of CDC l’Établissement Public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"><text:span text:style-name="T19">Je </text:span>suis actuellement en fin d’apprentissage en tant que data scientist au sein de la Direction de la formation continue de <text:span text:style-name="T18">la CDC </text:span>l’Établissement Public.</text:p>
          </table:table-cell>
        </table:table-row>
        <table:table-row>
          <table:table-cell table:style-name="Table2.A1" office:value-type="string">
            <text:p text:style-name="P12"><text:span text:style-name="T19">With a s</text:span>pecializ<text:span text:style-name="T19">ation </text:span>in natural language processing (NLP) and text mining, <text:span text:style-name="T19">I </text:span><text:span text:style-name="T7">possess</text:span> proven experience in the design and development of neural networks and other statistical models using PySpark, PyTorch, and Keras. <text:span text:style-name="T18">I am also proficient in </text:span>automatic information extraction (NER) pipelines, document classification <text:span text:style-name="T19">and storage in </text:span>databases. <text:span text:style-name="T18">I have a keen</text:span> interest in actively monitoring developments in LLMs and generative AI <text:span text:style-name="T18">research</text:span>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3">Spécialisé en traitement automatique du langage (NLP) et en text mining, <text:span text:style-name="T20">je possède </text:span>une expérience confirmée dans la conception <text:span text:style-name="T21">et développement de réseaux de neurones et autres modèles statistiques en PySpark, PyTorch, Keras, </text:span><text:span text:style-name="T19">ainsi que </text:span>de chaînes <text:span text:style-name="T19">d</text:span>’extraction automatique d’informations (NER), la classification de documents et <text:span text:style-name="T19">leur stockage en </text:span>bases de données, avec une forte appétence pour <text:span text:style-name="T20">la </text:span>veille <text:span text:style-name="T18">des dernières avancées en matière des </text:span>LLM et <text:span text:style-name="T18">de </text:span>l’IA générative.</text:p>
          </table:table-cell>
        </table:table-row>
        <table:table-row>
          <table:table-cell table:style-name="Table2.A1" office:value-type="string">
            <text:p text:style-name="P14">As a <text:span text:style-name="T7">seasoned</text:span> Python developer, I <text:span text:style-name="T7">possess a strong understanding of </text:span>DevOps <text:span text:style-name="T7">parctices </text:span>for scaling up MVPs and POCs using Docker <text:span text:style-name="T19">Compose</text:span>, Git, and CI/CD — skills I <text:span text:style-name="T7">honed over </text:span>three years of professional experience as a Java EE developer at an IT services firm, prior to transition<text:span text:style-name="T7">ing</text:span> into data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5">Développeur confirmé en Python, je suis également familier avec les techniques DevOps <text:span text:style-name="T20">pour </text:span>l’industrialisation des MVP <text:span text:style-name="T20">et de POC à l’aide de </text:span>Docker <text:span text:style-name="T19">Compose</text:span>, Git, CI/CD, acquises à travers les trois ans d’expériences professionnelles de développeur Java EE en ESN, antérieures à ma reconversation à la data.</text:p>
          </table:table-cell>
        </table:table-row>
        <table:table-row>
          <table:table-cell table:style-name="Table2.A1" office:value-type="string">
            <text:p text:style-name="P16">I am available starting in September 2026 and would be happy to meet with you in person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5">Disponible pour un CDI à partir de septembre 2026, je reste à votre disposition pour un entretien de vive voix.</text:p>
          </table:table-cell>
        </table:table-row>
        <table:table-row>
          <table:table-cell table:style-name="Table2.A1" office:value-type="string">
            <text:p text:style-name="Text_20_body_20_EN"><text:span text:style-name="T7">Best regards</text:span>,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">Cordialement,</text:p>
          </table:table-cell>
        </table:table-row>
        <table:table-row>
          <table:table-cell table:style-name="Table2.A1" office:value-type="string">
            <text:p text:style-name="Text_20_body_20_EN">Kiril <text:span text:style-name="T7">Isakov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ext_20_body">Kiril I<text:span text:style-name="T7">sakov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MS PMincho" svg:font-family="'MS PMincho'" style:font-family-generic="system" style:font-pitch="variable"/>
    <style:font-face style:name="Noto Sans Mono CJK JP" svg:font-family="'Noto Sans Mono CJK JP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MS PMincho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fr" fo:country="FR" style:letter-kerning="true" style:font-name-asian="MS PMincho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loext:opacity="100%" style:font-name="Times New Roman1" fo:font-family="'Times New Roman'" style:font-style-name="Regular" style:font-family-generic="roman" style:font-pitch="variable" fo:font-size="10.5pt" fo:language="fr" fo:country="FR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cm" style:contextual-spacing="false" fo:line-height="100%" fo:text-align="justify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style:font-name="Times New Roman1" fo:font-family="'Times New Roman'" style:font-style-name="Regular" style:font-family-generic="roman" style:font-pitch="variable" fo:font-size="10.5pt" fo:language="fr" fo:country="F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199cm" style:contextual-spacing="false" fo:hyphenation-ladder-count="no-limit" fo:hyphenation-keep="auto" loext:hyphenation-keep-type="column" loext:hyphenation-keep-line="false" fo:text-indent="-0.499cm" style:auto-text-indent="false" style:page-number="auto" text:number-lines="false" text:line-number="0"/>
      <style:text-properties fo:font-size="10p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Subject_20__28_Objet_29_" style:display-name="Text body Subject (Objet)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0.5pt" style:text-underline-style="none"/>
    </style:style>
    <style:style style:name="Text_20_body_20_A_20_l_27_attention_20_de" style:display-name="Text body A l'attention de" style:family="paragraph" style:parent-style-name="Table_20_Contents">
      <style:text-properties fo:font-size="12pt" fo:text-shadow="1pt 1pt"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Text_20_body_20_EN" style:display-name="Text body EN" style:family="paragraph" style:parent-style-name="Text_20_body" style:master-page-name="">
      <style:paragraph-properties style:page-number="auto"/>
      <style:text-properties fo:font-size="10.5pt" fo:language="en" fo:country="U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text-position="super 75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suffix="/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9-04-16T11:32:02.64</meta:creation-date>
    <meta:editing-duration>P1DT14H46M58S</meta:editing-duration>
    <meta:editing-cycles>1150</meta:editing-cycles>
    <meta:generator>LibreOffice/26.2.3.2$Linux_X86_64 LibreOffice_project/70e089b17412e4cb7773e41413306b17a2328c34</meta:generator>
    <dc:date>2026-05-18T00:21:47.109966948</dc:date>
    <meta:document-statistic meta:table-count="2" meta:image-count="0" meta:object-count="0" meta:page-count="1" meta:paragraph-count="24" meta:word-count="380" meta:character-count="2383" meta:non-whitespace-character-count="2027"/>
    <meta:user-defined meta:name="Info 1"/>
    <meta:user-defined meta:name="Info 2"/>
    <meta:user-defined meta:name="Info 3"/>
    <meta:user-defined meta:name="Info 4"/>
  </office:meta>
</office:document-meta>
</file>